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7e53" officeooo:paragraph-rsid="00137e53"/>
    </style:style>
    <style:style style:name="P2" style:family="paragraph" style:parent-style-name="Standard">
      <style:text-properties officeooo:rsid="00150066" officeooo:paragraph-rsid="00150066"/>
    </style:style>
    <style:style style:name="P3" style:family="paragraph" style:parent-style-name="Standard">
      <style:text-properties officeooo:rsid="00157d82" officeooo:paragraph-rsid="00157d82"/>
    </style:style>
    <style:style style:name="P4" style:family="paragraph" style:parent-style-name="Standard">
      <style:text-properties officeooo:rsid="001634b0" officeooo:paragraph-rsid="001634b0"/>
    </style:style>
    <style:style style:name="P5" style:family="paragraph" style:parent-style-name="Standard">
      <style:text-properties officeooo:rsid="0018101e" officeooo:paragraph-rsid="0018101e"/>
    </style:style>
    <style:style style:name="T1" style:family="text">
      <style:text-properties officeooo:rsid="001810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ish Lim<text:span text:style-name="T1">el</text:span>ight hardware app was also good for linux right now</text:p>
      <text:p text:style-name="P1">2. Figuring out how to get my system core into flash mode is being tricky</text:p>
      <text:p text:style-name="P1">3. It was unclear whether or not for the flash step if I should be using expansion hub external power alongside usb or just usb</text:p>
      <text:p text:style-name="P2">4. Did not realize that I needed to be pushing the config button while the power button is just pushes instead of while it is starting to boot or fully booted. <text:s/>USB A to C was used for it, then we got terminal connection and were able to flash the beta OS</text:p>
      <text:p text:style-name="P3">5. … Driver station packages list were missing for the Linux build, This makes me very sad as I love to use Linux for my robot development environment. I use Linux for this because it resolves an issue I have faced in the past where windows would disconnect from the control hub wifi network repeatably and sever the ADB connection. Uses linux allowed me to resolve this problem by having better configuration abilites (where I could remove roaming entirely and make it manual)</text:p>
      <text:p text:style-name="P4">6. just typing into the vs code terminal for WPILib, trying to start a python project was a challenge because it could not find the robotpy init module</text:p>
      <text:p text:style-name="P4"/>
      <text:p text:style-name="P5">Ended this session with the example Teleop working with one motor driven by 1 joystick over driver station wif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9T21:39:27.042790637</meta:creation-date>
    <dc:date>2026-05-09T23:05:11.816363932</dc:date>
    <meta:editing-duration>PT9M26S</meta:editing-duration>
    <meta:editing-cycles>1</meta:editing-cycles>
    <meta:document-statistic meta:table-count="0" meta:image-count="0" meta:object-count="0" meta:page-count="1" meta:paragraph-count="7" meta:word-count="234" meta:character-count="1259" meta:non-whitespace-character-count="1031"/>
    <meta:generator>LibreOffice/24.2.7.2$Linux_X86_64 LibreOffice_project/420$Build-2</meta:generator>
  </office:meta>
</office:document-meta>
</file>